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1000000100000200000002001C566261.png" manifest:media-type="image/png"/>
  <manifest:file-entry manifest:full-path="Pictures/1000000100000735000002EA55ED5C33.png" manifest:media-type="image/png"/>
  <manifest:file-entry manifest:full-path="Pictures/10000001000002000000020084A5EF19.png" manifest:media-type="image/png"/>
  <manifest:file-entry manifest:full-path="Pictures/TablePreview7.svm" manifest:media-type=""/>
  <manifest:file-entry manifest:full-path="Pictures/100000010000020000000200610BCB41.png" manifest:media-type="image/png"/>
  <manifest:file-entry manifest:full-path="Pictures/TablePreview3.svm" manifest:media-type=""/>
  <manifest:file-entry manifest:full-path="Pictures/100000000000020000000200AD68CF3C.png" manifest:media-type="image/png"/>
  <manifest:file-entry manifest:full-path="Pictures/10000000000002000000020039EC2875.png" manifest:media-type="image/png"/>
  <manifest:file-entry manifest:full-path="Pictures/100000000000020000000200270027C3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(Textkörper)" svg:font-family="'Calibri (Textkörper)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Wingdings" svg:font-family="Wingding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e2e8f0" draw:stroke-linejoin="round" draw:fill="none" loext:fill-use-slide-background="false" draw:textarea-horizontal-align="justify" draw:textarea-vertical-align="top" draw:auto-grow-height="false" draw:fit-to-size="false" style:shrink-to-fit="false" fo:padding-top="-0.124cm" fo:padding-bottom="-0.124cm" fo:padding-left="0.25cm" fo:padding-right="0.25cm" fo:wrap-option="wrap" loext:decorative="false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73cm" fo:min-width="10.421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>
      <style:graphic-properties draw:stroke="solid" svg:stroke-width="0.035cm" svg:stroke-color="#e2e8f0" draw:stroke-linejoin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>
      <style:graphic-properties draw:stroke="solid" svg:stroke-width="0.035cm" svg:stroke-color="#ffffff" draw:stroke-linejoin="round" draw:fill="solid" draw:fill-color="#f97316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1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>
      <style:graphic-properties draw:stroke="solid" svg:stroke-width="0.035cm" svg:stroke-color="#ffffff" draw:stroke-linejoin="round" draw:fill="solid" draw:fill-color="#22c55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6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>
      <style:graphic-properties draw:stroke="solid" svg:stroke-width="0.035cm" svg:stroke-color="#ffffff" draw:stroke-linejoin="round" draw:fill="solid" draw:fill-color="#3b82f6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2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2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1" style:family="graphic" style:parent-style-name="standard">
      <style:graphic-properties loext:decorative="false"/>
    </style:style>
    <style:style style:name="gr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9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>
      <style:graphic-properties draw:stroke="solid" svg:stroke-width="0.079cm" svg:stroke-color="#181717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71" style:family="graphic" style:parent-style-name="standard">
      <style:graphic-properties draw:stroke="solid" svg:stroke-width="0.079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72" style:family="graphic" style:parent-style-name="standard">
      <style:graphic-properties draw:stroke="solid" svg:stroke-width="0.079cm" svg:stroke-color="#00b0f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73" style:family="graphic" style:parent-style-name="standard">
      <style:graphic-properties draw:stroke="solid" svg:stroke-width="0.079cm" svg:stroke-color="#00b05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74" style:family="graphic" style:parent-style-name="standard">
      <style:graphic-properties draw:stroke="solid" svg:stroke-width="0.079cm" svg:stroke-color="#ffff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pr1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-0.125cm" fo:padding-bottom="-0.125cm" fo:padding-left="0.25cm" fo:padding-right="0.25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-0.125cm" fo:padding-bottom="-0.125cm" fo:padding-left="0.25cm" fo:padding-right="0.25cm" fo:wrap-option="wrap" loext:decorative="false"/>
      <style:paragraph-properties style:writing-mode="lr-tb"/>
    </style:style>
    <style:style style:name="pr3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-0.125cm" fo:padding-bottom="-0.125cm" fo:padding-left="0.25cm" fo:padding-right="0.25cm" fo:wrap-option="wrap" loext:decorative="false"/>
      <style:paragraph-properties style:writing-mode="lr-tb"/>
    </style:style>
    <style:style style:name="pr4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-0.125cm" fo:padding-bottom="-0.125cm" fo:padding-left="0.25cm" fo:padding-right="0.25cm" fo:wrap-option="wrap" loext:decorative="false"/>
      <style:paragraph-properties style:writing-mode="lr-tb"/>
    </style:style>
    <style:style style:name="pr5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-0.125cm" fo:padding-bottom="-0.125cm" fo:padding-left="0.25cm" fo:padding-right="0.25cm" fo:wrap-option="wrap" loext:decorative="false"/>
      <style:paragraph-properties style:writing-mode="lr-tb"/>
    </style:style>
    <style:style style:name="pr6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-0.125cm" fo:padding-bottom="-0.125cm" fo:padding-left="0.25cm" fo:padding-right="0.25cm" fo:wrap-option="wrap" loext:decorative="false"/>
      <style:paragraph-properties style:writing-mode="lr-tb"/>
    </style:style>
    <style:style style:name="pr7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-0.125cm" fo:padding-bottom="-0.125cm" fo:padding-left="0.25cm" fo:padding-right="0.25cm" fo:wrap-option="wrap" loext:decorative="false"/>
      <style:paragraph-properties style:writing-mode="lr-tb"/>
    </style:style>
    <style:style style:name="pr8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-0.125cm" fo:padding-bottom="-0.125cm" fo:padding-left="0.25cm" fo:padding-right="0.25cm" fo:wrap-option="wrap" loext:decorative="false"/>
      <style:paragraph-properties style:writing-mode="lr-tb"/>
    </style:style>
    <style:style style:name="pr9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-0.125cm" fo:padding-bottom="-0.125cm" fo:padding-left="0.25cm" fo:padding-right="0.25cm" fo:wrap-option="wrap" loext:decorative="false"/>
      <style:paragraph-properties style:writing-mode="lr-tb"/>
    </style:style>
    <style:style style:name="pr10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-0.125cm" fo:padding-bottom="-0.125cm" fo:padding-left="0.25cm" fo:padding-right="0.25cm" fo:wrap-option="wrap" loext:decorative="false"/>
      <style:paragraph-properties style:writing-mode="lr-tb"/>
    </style:style>
    <style:style style:name="co1" style:family="table-column">
      <style:table-column-properties style:column-width="1.262cm" style:use-optimal-column-width="false"/>
    </style:style>
    <style:style style:name="co2" style:family="table-column">
      <style:table-column-properties style:column-width="1.178cm" style:use-optimal-column-width="false"/>
    </style:style>
    <style:style style:name="co3" style:family="table-column">
      <style:table-column-properties style:column-width="1.22cm" style:use-optimal-column-width="false"/>
    </style:style>
    <style:style style:name="co4" style:family="table-column">
      <style:table-column-properties style:column-width="1.558cm" style:use-optimal-column-width="false"/>
    </style:style>
    <style:style style:name="co5" style:family="table-column">
      <style:table-column-properties style:column-width="1.454cm" style:use-optimal-column-width="false"/>
    </style:style>
    <style:style style:name="co6" style:family="table-column">
      <style:table-column-properties style:column-width="1.506cm" style:use-optimal-column-width="false"/>
    </style:style>
    <style:style style:name="co7" style:family="table-column">
      <style:table-column-properties style:column-width="1.634cm" style:use-optimal-column-width="false"/>
    </style:style>
    <style:style style:name="co8" style:family="table-column">
      <style:table-column-properties style:column-width="1.44cm" style:use-optimal-column-width="false"/>
    </style:style>
    <style:style style:name="co9" style:family="table-column">
      <style:table-column-properties style:column-width="1.4cm" style:use-optimal-column-width="false"/>
    </style:style>
    <style:style style:name="ro1" style:family="table-row">
      <style:table-row-properties style:row-height="1.093cm" style:use-optimal-row-height="false"/>
    </style:style>
    <style:style style:name="ro2" style:family="table-row">
      <style:table-row-properties style:row-height="0.842cm" style:use-optimal-row-height="false"/>
    </style:style>
    <style:style style:name="ro3" style:family="table-row">
      <style:table-row-properties style:row-height="0.893cm" style:use-optimal-row-height="false"/>
    </style:style>
    <style:style style:name="ro4" style:family="table-row">
      <style:table-row-properties style:row-height="0.566cm" style:use-optimal-row-height="false"/>
    </style:style>
    <style:style style:name="ro5" style:family="table-row">
      <style:table-row-properties style:row-height="1.013cm" style:use-optimal-row-height="false"/>
    </style:style>
    <style:style style:name="ro6" style:family="table-row">
      <style:table-row-properties style:row-height="0.642cm" style:use-optimal-row-height="false"/>
    </style:style>
    <style:style style:name="ro7" style:family="table-row">
      <style:table-row-properties style:row-height="0.873cm" style:use-optimal-row-height="false"/>
    </style:style>
    <style:style style:name="ro8" style:family="table-row">
      <style:table-row-properties style:row-height="0.649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000000"/>
    </style:style>
    <style:style style:name="ce2" style:family="table-cell">
      <loext:graphic-properties draw:fill="solid" draw:fill-color="#92d050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0" style:family="paragraph">
      <style:paragraph-properties fo:margin-left="0.953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2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solid" draw:fill-color="#f97316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5" style:family="paragraph">
      <loext:graphic-properties draw:fill="solid" draw:fill-color="#22c55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6" style:family="paragraph">
      <loext:graphic-properties draw:fill="solid" draw:fill-color="#3b82f6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8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" style:family="text">
      <style:text-properties fo:font-variant="normal" fo:text-transform="none" fo:color="#1e2328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name-asian="Calibri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8pt" fo:letter-spacing="normal" fo:language="en" fo:country="US" fo:font-style="normal" style:text-underline-style="none" fo:font-weight="normal" fo:background-color="transparent" style:font-name-asian="+mn-ea" style:font-size-asian="18pt" style:font-style-asian="normal" style:font-weight-asian="normal" style:font-name-complex="+mn-cs" style:font-size-complex="1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1e2328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name-asian="Calibri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1b3a6b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variant="normal" fo:text-transform="none" fo:color="#1e2328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Calibri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Calibri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1e2328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Calibri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1e2328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fo:background-color="transparent" style:font-name-asian="Calibri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name-asian="Calibri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8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0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normal" fo:background-color="transparent" style:font-name-asian="Calibri" style:font-size-asian="13pt" style:font-style-asian="italic" style:font-weight-asian="normal" style:font-size-complex="13pt" style:font-style-complex="italic" style:font-weight-complex="normal"/>
    </style:style>
    <style:style style:name="T21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(Textkörper)" fo:font-size="9pt" fo:letter-spacing="normal" fo:language="de" fo:country="DE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(Textkörper)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9pt" fo:letter-spacing="normal" fo:language="de" fo:country="DE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Wingdings" fo:font-size="13pt" fo:letter-spacing="normal" fo:language="en" fo:country="US" fo:font-style="italic" style:text-underline-style="none" fo:font-weight="normal" fo:background-color="transparent" style:font-name-asian="Calibri" style:font-size-asian="13pt" style:font-style-asian="italic" style:font-weight-asian="normal" style:font-size-complex="13pt" style:font-style-complex="italic" style:font-weight-complex="normal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1e232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1b3a6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">
        <style:list-level-properties text:min-label-width="0.953cm"/>
        <style:text-properties fo:font-family="Symbol" style:font-charset="x-symbol" fo:color="#1e232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">
        <style:list-level-properties text:min-label-width="0.953cm"/>
        <style:text-properties fo:font-family="Symbol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">
        <style:list-level-properties text:min-label-width="0.953cm"/>
        <style:text-properties fo:font-family="Symbol" style:font-charset="x-symbol" fo:color="#000000" fo:font-size="100%"/>
      </text:list-level-style-bullet>
      <text:list-level-style-bullet text:level="2" text:bullet-char="">
        <style:list-level-properties text:space-before="0.952cm" text:min-label-width="0.953cm"/>
        <style:text-properties fo:font-family="Symbol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">
        <style:list-level-properties text:min-label-width="0.953cm"/>
        <style:text-properties fo:font-family="Symbol" style:font-charset="x-symbol" fo:color="#1e2328" fo:font-size="100%"/>
      </text:list-level-style-bullet>
      <text:list-level-style-bullet text:level="2" text:bullet-char="">
        <style:list-level-properties text:space-before="0.952cm" text:min-label-width="0.953cm"/>
        <style:text-properties fo:font-family="Symbol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">
        <style:list-level-properties text:min-label-width="0.953cm"/>
        <style:text-properties fo:font-family="Symbol" style:font-charset="x-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">
        <style:list-level-properties text:min-label-width="0.953cm"/>
        <style:text-properties fo:font-family="Symbol" style:font-charset="x-symbol" fo:color="#1e2328" fo:font-size="100%"/>
      </text:list-level-style-bullet>
      <text:list-level-style-bullet text:level="2" text:bullet-char="">
        <style:list-level-properties text:space-before="0.952cm" text:min-label-width="0.953cm"/>
        <style:text-properties fo:font-family="Symbol" style:font-charset="x-symbol" fo:color="#00b05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">
        <style:list-level-properties text:min-label-width="0.953cm"/>
        <style:text-properties fo:font-family="Symbol" style:font-charset="x-symbol" fo:color="#00b050" fo:font-size="100%"/>
      </text:list-level-style-bullet>
      <text:list-level-style-bullet text:level="2" text:bullet-char="">
        <style:list-level-properties text:space-before="0.952cm" text:min-label-width="0.953cm"/>
        <style:text-properties fo:font-family="Symbol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6474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name="Text 0" draw:style-name="gr1" draw:text-style-name="P2" draw:layer="layout" svg:width="20.318cm" svg:height="4.57cm" svg:x="2.54cm" svg:y="3.81cm">
          <text:p text:style-name="P1"><text:span text:style-name="T1">Graph-based Multi-view Object Counting</text:span></text:p>
          <text:p text:style-name="P1"><text:span text:style-name="T1">via VGGT + SAM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2" draw:layer="layout" svg:width="0cm" svg:height="0cm" svg:x="0cm" svg:y="0cm" draw:page-number="1" presentation:class="page"/>
          <draw:frame draw:name="PlaceHolder 2" presentation:style-name="pr1" draw:text-style-name="P3" draw:layer="layout" svg:width="0cm" svg:height="0cm" svg:x="0cm" svg:y="0cm" presentation:class="notes" presentation:placeholder="true" presentation:user-transformed="true">
            <draw:text-box/>
          </draw:frame>
          <draw:frame draw:name="PlaceHolder 3" presentation:style-name="pr2" draw:text-style-name="P5" draw:layer="layout" svg:width="0cm" svg:height="0cm" svg:x="0cm" svg:y="0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Text 0" draw:style-name="gr3" draw:text-style-name="P7" draw:layer="layout" svg:width="22.858cm" svg:height="1.522cm" svg:x="1.27cm" svg:y="0.508cm">
          <text:p text:style-name="P6"><text:span text:style-name="T3">CCGS vs. Ou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" draw:style-name="gr4" draw:text-style-name="P8" draw:layer="layout" svg:x1="1.27cm" svg:y1="2.082cm" svg:x2="24.13cm" svg:y2="2.083cm">
          <text:p/>
        </draw:line>
        <draw:custom-shape draw:name="Text 2" draw:style-name="gr5" draw:text-style-name="P7" draw:layer="layout" svg:width="10.92cm" svg:height="0.887cm" svg:x="1.27cm" svg:y="2.03cm">
          <text:p text:style-name="P6"><text:span text:style-name="T4">CC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" draw:text-style-name="P11" draw:layer="layout" svg:width="10.92cm" svg:height="10.158cm" svg:x="1.27cm" svg:y="3.556cm">
          <text:list text:style-name="L5">
            <text:list-item>
              <text:p text:style-name="P9"><text:span text:style-name="T5">Input: RGB images, instance masks, pointmaps</text:span></text:p>
            </text:list-item>
          </text:list>
          <text:p text:style-name="P9"><text:span text:style-name="T6"/></text:p>
          <text:p text:style-name="P9"><text:span text:style-name="T7"/></text:p>
          <text:p text:style-name="P9"><text:span text:style-name="T7"/></text:p>
          <text:list text:continue-numbering="true" text:style-name="L5">
            <text:list-item>
              <text:p text:style-name="P9"><text:span text:style-name="T8">For each adjacent image pair (t → t+1):</text:span></text:p>
            </text:list-item>
          </text:list>
          <text:p text:style-name="P9"><text:span text:style-name="T7"/></text:p>
          <text:p text:style-name="P9"><text:span text:style-name="T9"/></text:p>
          <text:p text:style-name="P9"><text:span text:style-name="T9"/></text:p>
          <text:list text:style-name="L7">
            <text:list-item>
              <text:list>
                <text:list-item>
                  <text:p text:style-name="P9"><text:span text:style-name="T10">For each pixel (i,j) in image t:</text:span></text:p>
                </text:list-item>
                <text:list-item>
                  <text:p text:style-name="P9"><text:span text:style-name="T10">Find closest pixel in t+1 by minimizing pointmap distance</text:span></text:p>
                </text:list-item>
              </text:list>
            </text:list-item>
          </text:list>
          <text:p text:style-name="P9"><text:span text:style-name="T10"/></text:p>
          <text:list text:continue-numbering="true" text:style-name="L7">
            <text:list-item>
              <text:list>
                <text:list-item>
                  <text:p text:style-name="P9"><text:span text:style-name="T10">→ </text:span><text:span text:style-name="T10">correspondence mapping φ : (i,j) → (k,l)</text:span></text:p>
                </text:list-item>
                <text:list-item>
                  <text:p text:style-name="P9"><text:span text:style-name="T10">For instances a ∈ mask_t <text:s/>and <text:s/>b ∈ mask_t+1:</text:span></text:p>
                </text:list-item>
                <text:list-item>
                  <text:p text:style-name="P9"><text:span text:style-name="T10">Overlap = pixels of a whose φ lands inside b</text:span></text:p>
                </text:list-item>
                <text:list-item>
                  <text:p text:style-name="P9"><text:span text:style-name="T10">Cost(a,b) = 1 − overlap / min(|a|,|b|)</text:span></text:p>
                </text:list-item>
              </text:list>
            </text:list-item>
          </text:list>
          <text:p text:style-name="P10"><text:span text:style-name="T11"/></text:p>
          <text:list text:style-name="L8">
            <text:list-item>
              <text:p text:style-name="P9"><text:span text:style-name="T12">Hungarian algorithm → optimal 1-to-1 match</text:span></text:p>
            </text:list-item>
          </text:list>
          <text:p text:style-name="P9"><text:span text:style-name="T13"/></text:p>
          <text:p text:style-name="P9"><text:span text:style-name="T7"/></text:p>
          <text:p text:style-name="P9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" draw:text-style-name="P7" draw:layer="layout" svg:width="10.92cm" svg:height="1.522cm" svg:x="13.208cm" svg:y="1.653cm">
          <text:p text:style-name="P6"><text:span text:style-name="T4">Ou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8" draw:style-name="gr8" draw:text-style-name="P8" draw:layer="layout" svg:x1="12.573cm" svg:y1="2.54cm" svg:x2="12.574cm" svg:y2="13.462cm">
          <text:p/>
        </draw:line>
        <draw:custom-shape draw:name="Text 3" draw:style-name="gr9" draw:text-style-name="P11" draw:layer="layout" svg:width="10.92cm" svg:height="10.158cm" svg:x="12.615cm" svg:y="3.556cm">
          <text:list text:style-name="L5">
            <text:list-item>
              <text:p text:style-name="P9"><text:span text:style-name="T5">Input: RGB images, instance masks, pointmaps</text:span><text:span text:style-name="T14"><text:line-break/></text:span><text:span text:style-name="T5">optional: VGGT confidence, camera poses</text:span></text:p>
            </text:list-item>
          </text:list>
          <text:list text:style-name="L9">
            <text:list-item>
              <text:p text:style-name="P9"><text:span text:style-name="T15">For each instance: generate Graph node (image_index, instance_id)</text:span></text:p>
            </text:list-item>
          </text:list>
          <text:list text:style-name="L5">
            <text:list-item>
              <text:p text:style-name="P9"><text:span text:style-name="T5">For </text:span><text:span text:style-name="T16">all</text:span><text:span text:style-name="T5"> image pairs (t1 → t2):</text:span></text:p>
            </text:list-item>
          </text:list>
          <text:list text:style-name="L10">
            <text:list-item>
              <text:list>
                <text:list-item>
                  <text:p text:style-name="P9"><text:span text:style-name="T17">Optional: discard image pairs with large camera distance</text:span></text:p>
                </text:list-item>
                <text:list-item>
                  <text:p text:style-name="P9"><text:span text:style-name="T18">restrict to instance pixels (mask &gt; 0)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9"><text:span text:style-name="T11">For each pixel (i,j) in image t1:</text:span></text:p>
                </text:list-item>
                <text:list-item>
                  <text:p text:style-name="P9"><text:span text:style-name="T11">Find closest pixel in t2 by minimizing pointmap distance</text:span></text:p>
                </text:list-item>
                <text:list-item>
                  <text:p text:style-name="P9"><text:span text:style-name="T17">Discard distant pixels</text:span></text:p>
                </text:list-item>
                <text:list-item>
                  <text:p text:style-name="P9"><text:span text:style-name="T11">→ </text:span><text:span text:style-name="T11">correspondence mapping φ : (i,j) → (k,l)</text:span></text:p>
                </text:list-item>
                <text:list-item>
                  <text:p text:style-name="P9"><text:span text:style-name="T11">For instances a ∈ mask_t1 <text:s/>and <text:s/>b ∈ mask_t2:</text:span></text:p>
                </text:list-item>
                <text:list-item>
                  <text:p text:style-name="P9"><text:span text:style-name="T11">Overlap = pixels of a whose φ lands inside b</text:span></text:p>
                </text:list-item>
                <text:list-item>
                  <text:p text:style-name="P9"><text:span text:style-name="T11">Cost(a,b) = 1 − overlap / min(|a|,|b|)</text:span></text:p>
                </text:list-item>
                <text:list-item>
                  <text:p text:style-name="P9"><text:span text:style-name="T17">Discard low percentage matches</text:span></text:p>
                </text:list-item>
              </text:list>
            </text:list-item>
            <text:list-item>
              <text:p text:style-name="P9"><text:span text:style-name="T12">Hungarian algorithm → optimal 1-to-1 match</text:span></text:p>
            </text:list-item>
          </text:list>
          <text:list text:style-name="L11">
            <text:list-item>
              <text:p text:style-name="P9"><text:span text:style-name="T18">Add graph edge between matched instances</text:span></text:p>
            </text:list-item>
            <text:list-item>
              <text:p text:style-name="P9"><text:span text:style-name="T18">count connected components in the graph</text:span><text:span text:style-name="T19"><text:line-break/></text:span><text:span text:style-name="T19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2" draw:layer="layout" svg:width="0cm" svg:height="0cm" svg:x="0cm" svg:y="0cm" draw:page-number="2" presentation:class="page"/>
          <draw:frame draw:name="PlaceHolder 2" presentation:style-name="pr3" draw:text-style-name="P3" draw:layer="layout" svg:width="0cm" svg:height="0cm" svg:x="0cm" svg:y="0cm" presentation:class="notes" presentation:placeholder="true" presentation:user-transformed="true">
            <draw:text-box/>
          </draw:frame>
          <draw:frame draw:name="PlaceHolder 3" presentation:style-name="pr2" draw:text-style-name="P5" draw:layer="layout" svg:width="0cm" svg:height="0cm" svg:x="0cm" svg:y="0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custom-shape draw:name="Text 0" draw:style-name="gr10" draw:text-style-name="P7" draw:layer="layout" svg:width="22.858cm" svg:height="1.522cm" svg:x="1.27cm" svg:y="0.508cm">
          <text:p text:style-name="P6"><text:span text:style-name="T3">Walkthroug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" draw:style-name="gr4" draw:text-style-name="P8" draw:layer="layout" svg:x1="1.27cm" svg:y1="2.082cm" svg:x2="24.13cm" svg:y2="2.083cm">
          <text:p/>
        </draw:line>
        <draw:custom-shape draw:name="Text 2" draw:style-name="gr11" draw:text-style-name="P7" draw:layer="layout" svg:width="22.858cm" svg:height="0.76cm" svg:x="1.27cm" svg:y="2.286cm">
          <text:p text:style-name="P6"><text:span text:style-name="T20">3 input images + SAM3 instance masks <text:s/>(prompt: "shoe"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" draw:text-style-name="P2" draw:layer="layout" svg:width="7.11cm" svg:height="0.709cm" svg:x="1.016cm" svg:y="7.747cm">
          <text:p text:style-name="P1"><text:span text:style-name="T21">RGB: 00001.p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3" draw:text-style-name="P2" draw:layer="layout" svg:width="7.11cm" svg:height="0.709cm" svg:x="1.016cm" svg:y="13.081cm">
          <text:p text:style-name="P1"><text:span text:style-name="T21">SAM3 mask - 4 insta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4" draw:text-style-name="P2" draw:layer="layout" svg:width="7.11cm" svg:height="0.709cm" svg:x="8.89cm" svg:y="7.747cm">
          <text:p text:style-name="P1"><text:span text:style-name="T21">RGB: 00002.p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5" draw:text-style-name="P2" draw:layer="layout" svg:width="7.11cm" svg:height="0.709cm" svg:x="8.89cm" svg:y="13.081cm">
          <text:p text:style-name="P1"><text:span text:style-name="T21">SAM3 mask - 5 insta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6" draw:text-style-name="P2" draw:layer="layout" svg:width="7.11cm" svg:height="0.709cm" svg:x="16.764cm" svg:y="7.747cm">
          <text:p text:style-name="P1"><text:span text:style-name="T21">RGB: 00008.p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17" draw:text-style-name="P2" draw:layer="layout" svg:width="7.11cm" svg:height="0.709cm" svg:x="16.764cm" svg:y="13.081cm">
          <text:p text:style-name="P1"><text:span text:style-name="T21">SAM3 mask - 3 insta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18" draw:text-style-name="P12" draw:layer="layout" svg:width="22.858cm" svg:height="0.633cm" svg:x="1.27cm" svg:y="13.843cm">
          <text:p text:style-name="P1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44" draw:style-name="gr19" draw:text-style-name="P13" draw:layer="layout" svg:width="4.637cm" svg:height="4.637cm" svg:x="2.252cm" svg:y="3.205cm">
          <draw:image xlink:href="Pictures/1000000100000200000002001C566261.png" xlink:type="simple" xlink:show="embed" xlink:actuate="onLoad" draw:mime-type="image/png">
            <text:p/>
          </draw:image>
        </draw:frame>
        <draw:frame draw:name="Grafik 46" draw:style-name="gr19" draw:text-style-name="P13" draw:layer="layout" svg:width="4.637cm" svg:height="4.637cm" svg:x="10.025cm" svg:y="3.251cm">
          <draw:image xlink:href="Pictures/10000001000002000000020084A5EF19.png" xlink:type="simple" xlink:show="embed" xlink:actuate="onLoad" draw:mime-type="image/png">
            <text:p/>
          </draw:image>
        </draw:frame>
        <draw:frame draw:name="Grafik 48" draw:style-name="gr19" draw:text-style-name="P13" draw:layer="layout" svg:width="4.637cm" svg:height="4.637cm" svg:x="17.899cm" svg:y="3.175cm">
          <draw:image xlink:href="Pictures/100000010000020000000200610BCB41.png" xlink:type="simple" xlink:show="embed" xlink:actuate="onLoad" draw:mime-type="image/png">
            <text:p/>
          </draw:image>
        </draw:frame>
        <draw:frame draw:name="Grafik 50" draw:style-name="gr19" draw:text-style-name="P13" draw:layer="layout" svg:width="4.689cm" svg:height="4.689cm" svg:x="2.252cm" svg:y="8.509cm">
          <draw:image xlink:href="Pictures/100000000000020000000200AD68CF3C.png" xlink:type="simple" xlink:show="embed" xlink:actuate="onLoad" draw:mime-type="image/png">
            <text:p/>
          </draw:image>
        </draw:frame>
        <draw:frame draw:name="Grafik 52" draw:style-name="gr19" draw:text-style-name="P13" draw:layer="layout" svg:width="4.689cm" svg:height="4.689cm" svg:x="9.999cm" svg:y="8.585cm">
          <draw:image xlink:href="Pictures/10000000000002000000020039EC2875.png" xlink:type="simple" xlink:show="embed" xlink:actuate="onLoad" draw:mime-type="image/png">
            <text:p/>
          </draw:image>
        </draw:frame>
        <draw:frame draw:name="Grafik 54" draw:style-name="gr19" draw:text-style-name="P13" draw:layer="layout" svg:width="4.578cm" svg:height="4.578cm" svg:x="18.03cm" svg:y="8.619cm">
          <draw:image xlink:href="Pictures/100000000000020000000200270027C3.png" xlink:type="simple" xlink:show="embed" xlink:actuate="onLoad" draw:mime-type="image/png">
            <text:p/>
          </draw:image>
        </draw:frame>
        <draw:custom-shape draw:name="Text 12" draw:style-name="gr20" draw:text-style-name="P2" draw:layer="layout" svg:width="0.582cm" svg:height="0.582cm" svg:x="7.439cm" svg:y="9.44cm">
          <text:p text:style-name="P1"><text:span text:style-name="T2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2" draw:layer="layout" svg:width="0cm" svg:height="0cm" svg:x="0cm" svg:y="0cm" draw:page-number="3" presentation:class="page"/>
          <draw:frame draw:name="PlaceHolder 2" presentation:style-name="pr4" draw:text-style-name="P3" draw:layer="layout" svg:width="0cm" svg:height="0cm" svg:x="0cm" svg:y="0cm" presentation:class="notes" presentation:placeholder="true" presentation:user-transformed="true">
            <draw:text-box/>
          </draw:frame>
          <draw:frame draw:name="PlaceHolder 3" presentation:style-name="pr2" draw:text-style-name="P5" draw:layer="layout" svg:width="0cm" svg:height="0cm" svg:x="0cm" svg:y="0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4" draw:style-name="dp1" draw:master-page-name="DEFAULT">
        <draw:custom-shape draw:name="Text 0" draw:style-name="gr21" draw:text-style-name="P7" draw:layer="layout" svg:width="22.858cm" svg:height="1.522cm" svg:x="1.27cm" svg:y="0.508cm">
          <text:p text:style-name="P6"><text:span text:style-name="T3">Walkthroug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" draw:style-name="gr4" draw:text-style-name="P8" draw:layer="layout" svg:x1="1.27cm" svg:y1="2.082cm" svg:x2="24.13cm" svg:y2="2.083cm">
          <text:p/>
        </draw:line>
        <draw:custom-shape draw:name="Text 2" draw:style-name="gr22" draw:text-style-name="P11" draw:layer="layout" svg:width="22.858cm" svg:height="0.76cm" svg:x="1.27cm" svg:y="2.286cm">
          <text:p text:style-name="P9"><text:span text:style-name="T20">For all instances: Generate graph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3" draw:text-style-name="P2" draw:layer="layout" svg:width="7.11cm" svg:height="0.709cm" svg:x="1.016cm" svg:y="7.747cm">
          <text:p text:style-name="P1"><text:span text:style-name="T21">RGB: 00001.p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4" draw:text-style-name="P2" draw:layer="layout" svg:width="7.11cm" svg:height="0.709cm" svg:x="1.016cm" svg:y="13.081cm">
          <text:p text:style-name="P1"><text:span text:style-name="T21">SAM3 mask - 4 insta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5" draw:text-style-name="P2" draw:layer="layout" svg:width="7.11cm" svg:height="0.709cm" svg:x="8.89cm" svg:y="7.747cm">
          <text:p text:style-name="P1"><text:span text:style-name="T21">RGB: 00002.p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26" draw:text-style-name="P2" draw:layer="layout" svg:width="7.11cm" svg:height="0.709cm" svg:x="8.89cm" svg:y="13.081cm">
          <text:p text:style-name="P1"><text:span text:style-name="T21">SAM3 mask - 5 insta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27" draw:text-style-name="P2" draw:layer="layout" svg:width="7.11cm" svg:height="0.709cm" svg:x="16.764cm" svg:y="7.747cm">
          <text:p text:style-name="P1"><text:span text:style-name="T21">RGB: 00008.p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28" draw:text-style-name="P2" draw:layer="layout" svg:width="7.11cm" svg:height="0.709cm" svg:x="16.764cm" svg:y="13.081cm">
          <text:p text:style-name="P1"><text:span text:style-name="T21">SAM3 mask - 3 insta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18" draw:text-style-name="P12" draw:layer="layout" svg:width="22.858cm" svg:height="0.633cm" svg:x="1.27cm" svg:y="13.843cm">
          <text:p text:style-name="P1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44" draw:style-name="gr19" draw:text-style-name="P13" draw:layer="layout" svg:width="4.637cm" svg:height="4.637cm" svg:x="2.252cm" svg:y="3.205cm">
          <draw:image xlink:href="Pictures/1000000100000200000002001C566261.png" xlink:type="simple" xlink:show="embed" xlink:actuate="onLoad" draw:mime-type="image/png">
            <text:p/>
          </draw:image>
        </draw:frame>
        <draw:frame draw:name="Grafik 46" draw:style-name="gr19" draw:text-style-name="P13" draw:layer="layout" svg:width="4.637cm" svg:height="4.637cm" svg:x="10.025cm" svg:y="3.251cm">
          <draw:image xlink:href="Pictures/10000001000002000000020084A5EF19.png" xlink:type="simple" xlink:show="embed" xlink:actuate="onLoad" draw:mime-type="image/png">
            <text:p/>
          </draw:image>
        </draw:frame>
        <draw:frame draw:name="Grafik 48" draw:style-name="gr19" draw:text-style-name="P13" draw:layer="layout" svg:width="4.637cm" svg:height="4.637cm" svg:x="17.899cm" svg:y="3.175cm">
          <draw:image xlink:href="Pictures/100000010000020000000200610BCB41.png" xlink:type="simple" xlink:show="embed" xlink:actuate="onLoad" draw:mime-type="image/png">
            <text:p/>
          </draw:image>
        </draw:frame>
        <draw:frame draw:name="Grafik 50" draw:style-name="gr19" draw:text-style-name="P13" draw:layer="layout" svg:width="4.689cm" svg:height="4.689cm" svg:x="2.252cm" svg:y="8.509cm">
          <draw:image xlink:href="Pictures/100000000000020000000200AD68CF3C.png" xlink:type="simple" xlink:show="embed" xlink:actuate="onLoad" draw:mime-type="image/png">
            <text:p/>
          </draw:image>
        </draw:frame>
        <draw:frame draw:name="Grafik 52" draw:style-name="gr19" draw:text-style-name="P13" draw:layer="layout" svg:width="4.689cm" svg:height="4.689cm" svg:x="9.999cm" svg:y="8.585cm">
          <draw:image xlink:href="Pictures/10000000000002000000020039EC2875.png" xlink:type="simple" xlink:show="embed" xlink:actuate="onLoad" draw:mime-type="image/png">
            <text:p/>
          </draw:image>
        </draw:frame>
        <draw:frame draw:name="Grafik 54" draw:style-name="gr19" draw:text-style-name="P13" draw:layer="layout" svg:width="4.578cm" svg:height="4.578cm" svg:x="18.03cm" svg:y="8.619cm">
          <draw:image xlink:href="Pictures/100000000000020000000200270027C3.png" xlink:type="simple" xlink:show="embed" xlink:actuate="onLoad" draw:mime-type="image/png">
            <text:p/>
          </draw:image>
        </draw:frame>
        <draw:custom-shape draw:name="Text 12" draw:style-name="gr29" draw:text-style-name="P2" draw:layer="layout" svg:width="0.582cm" svg:height="0.582cm" svg:x="7.439cm" svg:y="9.44cm">
          <text:p text:style-name="P1"><text:span text:style-name="T2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30" draw:text-style-name="P14" draw:layer="layout" svg:width="0.568cm" svg:height="0.582cm" svg:x="3.436cm" svg:y="10.359cm">
          <text:p text:style-name="P9"><text:span text:style-name="T24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31" draw:text-style-name="P2" draw:layer="layout" svg:width="0.568cm" svg:height="0.582cm" svg:x="3.436cm" svg:y="10.359cm">
          <text:p text:style-name="P1"><text:span text:style-name="T2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30" draw:text-style-name="P14" draw:layer="layout" svg:width="0.568cm" svg:height="0.582cm" svg:x="2.971cm" svg:y="9.221cm">
          <text:p text:style-name="P9"><text:span text:style-name="T24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32" draw:text-style-name="P2" draw:layer="layout" svg:width="0.568cm" svg:height="0.582cm" svg:x="2.971cm" svg:y="9.221cm">
          <text:p text:style-name="P1"><text:span text:style-name="T2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30" draw:text-style-name="P14" draw:layer="layout" svg:width="0.568cm" svg:height="0.582cm" svg:x="5.593cm" svg:y="10.229cm">
          <text:p text:style-name="P9"><text:span text:style-name="T24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33" draw:text-style-name="P2" draw:layer="layout" svg:width="0.568cm" svg:height="0.582cm" svg:x="5.593cm" svg:y="10.229cm">
          <text:p text:style-name="P1"><text:span text:style-name="T2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30" draw:text-style-name="P14" draw:layer="layout" svg:width="0.568cm" svg:height="0.582cm" svg:x="5.022cm" svg:y="12.175cm">
          <text:p text:style-name="P9"><text:span text:style-name="T24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34" draw:text-style-name="P2" draw:layer="layout" svg:width="0.568cm" svg:height="0.582cm" svg:x="5.022cm" svg:y="12.175cm">
          <text:p text:style-name="P1"><text:span text:style-name="T25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5" draw:text-style-name="P15" draw:layer="layout" svg:width="0.598cm" svg:height="0.602cm" svg:x="13.318cm" svg:y="11.621cm">
          <text:p text:style-name="P9"><text:span text:style-name="T24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36" draw:text-style-name="P2" draw:layer="layout" svg:width="0.598cm" svg:height="0.602cm" svg:x="13.318cm" svg:y="11.621cm">
          <text:p text:style-name="P1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5" draw:text-style-name="P15" draw:layer="layout" svg:width="0.507cm" svg:height="0.602cm" svg:x="14.284cm" svg:y="10.809cm">
          <text:p text:style-name="P9"><text:span text:style-name="T24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37" draw:text-style-name="P2" draw:layer="layout" svg:width="0.507cm" svg:height="0.602cm" svg:x="14.284cm" svg:y="10.809cm">
          <text:p text:style-name="P1"><text:span text:style-name="T2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5" draw:text-style-name="P15" draw:layer="layout" svg:width="0.598cm" svg:height="0.602cm" svg:x="13.841cm" svg:y="9.598cm">
          <text:p text:style-name="P9"><text:span text:style-name="T24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38" draw:text-style-name="P2" draw:layer="layout" svg:width="0.598cm" svg:height="0.602cm" svg:x="13.841cm" svg:y="9.598cm">
          <text:p text:style-name="P1"><text:span text:style-name="T25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5" draw:text-style-name="P15" draw:layer="layout" svg:width="0.598cm" svg:height="0.602cm" svg:x="12.146cm" svg:y="9.863cm">
          <text:p text:style-name="P9"><text:span text:style-name="T24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39" draw:text-style-name="P2" draw:layer="layout" svg:width="0.598cm" svg:height="0.602cm" svg:x="12.146cm" svg:y="9.863cm">
          <text:p text:style-name="P1"><text:span text:style-name="T25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5" draw:text-style-name="P15" draw:layer="layout" svg:width="0.598cm" svg:height="0.602cm" svg:x="10.406cm" svg:y="11.319cm">
          <text:p text:style-name="P9"><text:span text:style-name="T24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40" draw:text-style-name="P2" draw:layer="layout" svg:width="0.598cm" svg:height="0.602cm" svg:x="10.406cm" svg:y="11.319cm">
          <text:p text:style-name="P1"><text:span text:style-name="T2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1" draw:text-style-name="P16" draw:layer="layout" svg:width="0.582cm" svg:height="0.582cm" svg:x="18.532cm" svg:y="10.094cm">
          <text:p text:style-name="P9"><text:span text:style-name="T24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42" draw:text-style-name="P2" draw:layer="layout" svg:width="0.582cm" svg:height="0.582cm" svg:x="18.532cm" svg:y="10.094cm">
          <text:p text:style-name="P1"><text:span text:style-name="T2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1" draw:text-style-name="P16" draw:layer="layout" svg:width="0.582cm" svg:height="0.582cm" svg:x="21.954cm" svg:y="9.773cm">
          <text:p text:style-name="P9"><text:span text:style-name="T24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43" draw:text-style-name="P2" draw:layer="layout" svg:width="0.582cm" svg:height="0.582cm" svg:x="21.954cm" svg:y="9.773cm">
          <text:p text:style-name="P1"><text:span text:style-name="T2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1" draw:text-style-name="P16" draw:layer="layout" svg:width="0.582cm" svg:height="0.582cm" svg:x="19.469cm" svg:y="8.856cm">
          <text:p text:style-name="P9"><text:span text:style-name="T24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44" draw:text-style-name="P2" draw:layer="layout" svg:width="0.582cm" svg:height="0.582cm" svg:x="19.469cm" svg:y="8.856cm">
          <text:p text:style-name="P1"><text:span text:style-name="T2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2" draw:layer="layout" svg:width="0cm" svg:height="0cm" svg:x="0cm" svg:y="0cm" draw:page-number="4" presentation:class="page"/>
          <draw:frame draw:name="PlaceHolder 2" presentation:style-name="pr5" draw:text-style-name="P3" draw:layer="layout" svg:width="0cm" svg:height="0cm" svg:x="0cm" svg:y="0cm" presentation:class="notes" presentation:placeholder="true" presentation:user-transformed="true">
            <draw:text-box/>
          </draw:frame>
          <draw:frame draw:name="PlaceHolder 3" presentation:style-name="pr2" draw:text-style-name="P5" draw:layer="layout" svg:width="0cm" svg:height="0cm" svg:x="0cm" svg:y="0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5" draw:style-name="dp1" draw:master-page-name="DEFAULT">
        <draw:custom-shape draw:name="Text 0" draw:style-name="gr45" draw:text-style-name="P7" draw:layer="layout" svg:width="22.858cm" svg:height="1.522cm" svg:x="1.27cm" svg:y="0.508cm">
          <text:p text:style-name="P6"><text:span text:style-name="T3">Walkthroug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" draw:style-name="gr4" draw:text-style-name="P8" draw:layer="layout" svg:x1="1.27cm" svg:y1="2.082cm" svg:x2="24.13cm" svg:y2="2.083cm">
          <text:p/>
        </draw:line>
        <draw:custom-shape draw:name="Text 2" draw:style-name="gr46" draw:text-style-name="P11" draw:layer="layout" svg:width="22.858cm" svg:height="0.76cm" svg:x="1.27cm" svg:y="2.286cm">
          <text:p text:style-name="P9"><text:span text:style-name="T20">For all image pairs: Compute instance matching c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7" draw:text-style-name="P2" draw:layer="layout" svg:width="7.11cm" svg:height="0.709cm" svg:x="1.016cm" svg:y="7.747cm">
          <text:p text:style-name="P1"><text:span text:style-name="T21">RGB: 00001.p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8" draw:text-style-name="P2" draw:layer="layout" svg:width="7.11cm" svg:height="0.709cm" svg:x="1.016cm" svg:y="13.081cm">
          <text:p text:style-name="P1"><text:span text:style-name="T21">SAM3 mask - 4 insta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9" draw:text-style-name="P2" draw:layer="layout" svg:width="7.11cm" svg:height="0.709cm" svg:x="8.89cm" svg:y="7.747cm">
          <text:p text:style-name="P1"><text:span text:style-name="T21">RGB: 00002.p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0" draw:text-style-name="P2" draw:layer="layout" svg:width="7.11cm" svg:height="0.709cm" svg:x="8.89cm" svg:y="13.081cm">
          <text:p text:style-name="P1"><text:span text:style-name="T21">SAM3 mask - 5 insta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18" draw:text-style-name="P12" draw:layer="layout" svg:width="22.858cm" svg:height="0.633cm" svg:x="1.27cm" svg:y="13.843cm">
          <text:p text:style-name="P1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44" draw:style-name="gr19" draw:text-style-name="P13" draw:layer="layout" svg:width="4.637cm" svg:height="4.637cm" svg:x="2.252cm" svg:y="3.205cm">
          <draw:image xlink:href="Pictures/1000000100000200000002001C566261.png" xlink:type="simple" xlink:show="embed" xlink:actuate="onLoad" draw:mime-type="image/png">
            <text:p/>
          </draw:image>
        </draw:frame>
        <draw:frame draw:name="Grafik 46" draw:style-name="gr19" draw:text-style-name="P13" draw:layer="layout" svg:width="4.637cm" svg:height="4.637cm" svg:x="10.025cm" svg:y="3.251cm">
          <draw:image xlink:href="Pictures/10000001000002000000020084A5EF19.png" xlink:type="simple" xlink:show="embed" xlink:actuate="onLoad" draw:mime-type="image/png">
            <text:p/>
          </draw:image>
        </draw:frame>
        <draw:frame draw:name="Grafik 50" draw:style-name="gr19" draw:text-style-name="P13" draw:layer="layout" svg:width="4.689cm" svg:height="4.689cm" svg:x="2.252cm" svg:y="8.509cm">
          <draw:image xlink:href="Pictures/100000000000020000000200AD68CF3C.png" xlink:type="simple" xlink:show="embed" xlink:actuate="onLoad" draw:mime-type="image/png">
            <text:p/>
          </draw:image>
        </draw:frame>
        <draw:frame draw:name="Grafik 52" draw:style-name="gr19" draw:text-style-name="P13" draw:layer="layout" svg:width="4.689cm" svg:height="4.689cm" svg:x="9.999cm" svg:y="8.585cm">
          <draw:image xlink:href="Pictures/10000000000002000000020039EC2875.png" xlink:type="simple" xlink:show="embed" xlink:actuate="onLoad" draw:mime-type="image/png">
            <text:p/>
          </draw:image>
        </draw:frame>
        <draw:custom-shape draw:name="Text 12" draw:style-name="gr51" draw:text-style-name="P2" draw:layer="layout" svg:width="0.582cm" svg:height="0.582cm" svg:x="7.439cm" svg:y="9.44cm">
          <text:p text:style-name="P1"><text:span text:style-name="T2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30" draw:text-style-name="P14" draw:layer="layout" svg:width="0.568cm" svg:height="0.582cm" svg:x="3.436cm" svg:y="10.359cm">
          <text:p text:style-name="P9"><text:span text:style-name="T24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52" draw:text-style-name="P2" draw:layer="layout" svg:width="0.568cm" svg:height="0.582cm" svg:x="3.436cm" svg:y="10.359cm">
          <text:p text:style-name="P1"><text:span text:style-name="T2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30" draw:text-style-name="P14" draw:layer="layout" svg:width="0.568cm" svg:height="0.582cm" svg:x="2.971cm" svg:y="9.221cm">
          <text:p text:style-name="P9"><text:span text:style-name="T24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53" draw:text-style-name="P2" draw:layer="layout" svg:width="0.568cm" svg:height="0.582cm" svg:x="2.971cm" svg:y="9.221cm">
          <text:p text:style-name="P1"><text:span text:style-name="T2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30" draw:text-style-name="P14" draw:layer="layout" svg:width="0.568cm" svg:height="0.582cm" svg:x="5.593cm" svg:y="10.229cm">
          <text:p text:style-name="P9"><text:span text:style-name="T24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54" draw:text-style-name="P2" draw:layer="layout" svg:width="0.568cm" svg:height="0.582cm" svg:x="5.593cm" svg:y="10.229cm">
          <text:p text:style-name="P1"><text:span text:style-name="T2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30" draw:text-style-name="P14" draw:layer="layout" svg:width="0.568cm" svg:height="0.582cm" svg:x="5.022cm" svg:y="12.175cm">
          <text:p text:style-name="P9"><text:span text:style-name="T24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55" draw:text-style-name="P2" draw:layer="layout" svg:width="0.568cm" svg:height="0.582cm" svg:x="5.022cm" svg:y="12.175cm">
          <text:p text:style-name="P1"><text:span text:style-name="T25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5" draw:text-style-name="P15" draw:layer="layout" svg:width="0.598cm" svg:height="0.602cm" svg:x="13.318cm" svg:y="11.621cm">
          <text:p text:style-name="P9"><text:span text:style-name="T24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56" draw:text-style-name="P2" draw:layer="layout" svg:width="0.598cm" svg:height="0.602cm" svg:x="13.318cm" svg:y="11.621cm">
          <text:p text:style-name="P1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5" draw:text-style-name="P15" draw:layer="layout" svg:width="0.507cm" svg:height="0.602cm" svg:x="14.284cm" svg:y="10.809cm">
          <text:p text:style-name="P9"><text:span text:style-name="T24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57" draw:text-style-name="P2" draw:layer="layout" svg:width="0.507cm" svg:height="0.602cm" svg:x="14.284cm" svg:y="10.809cm">
          <text:p text:style-name="P1"><text:span text:style-name="T2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5" draw:text-style-name="P15" draw:layer="layout" svg:width="0.598cm" svg:height="0.602cm" svg:x="13.841cm" svg:y="9.598cm">
          <text:p text:style-name="P9"><text:span text:style-name="T24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58" draw:text-style-name="P2" draw:layer="layout" svg:width="0.598cm" svg:height="0.602cm" svg:x="13.841cm" svg:y="9.598cm">
          <text:p text:style-name="P1"><text:span text:style-name="T25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5" draw:text-style-name="P15" draw:layer="layout" svg:width="0.598cm" svg:height="0.602cm" svg:x="12.146cm" svg:y="9.863cm">
          <text:p text:style-name="P9"><text:span text:style-name="T24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59" draw:text-style-name="P2" draw:layer="layout" svg:width="0.598cm" svg:height="0.602cm" svg:x="12.146cm" svg:y="9.863cm">
          <text:p text:style-name="P1"><text:span text:style-name="T25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5" draw:text-style-name="P15" draw:layer="layout" svg:width="0.598cm" svg:height="0.602cm" svg:x="10.406cm" svg:y="11.319cm">
          <text:p text:style-name="P9"><text:span text:style-name="T24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60" draw:text-style-name="P2" draw:layer="layout" svg:width="0.598cm" svg:height="0.602cm" svg:x="10.406cm" svg:y="11.319cm">
          <text:p text:style-name="P1"><text:span text:style-name="T2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14" draw:style-name="gr61" draw:layer="layout" svg:width="7.319cm" svg:height="6.458cm" svg:x="16.002cm" svg:y="3.492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1" table:default-cell-style-name="ce1">
              <table:table-cell>
                <text:p text:style-name="P9"><text:span text:style-name="T26">Img1/</text:span><text:span text:style-name="T27"><text:line-break/></text:span><text:span text:style-name="T26">img2</text:span></text:p>
              </table:table-cell>
              <table:table-cell>
                <text:p text:style-name="P9"><text:span text:style-name="T26">inst. 1</text:span></text:p>
              </table:table-cell>
              <table:table-cell>
                <text:p text:style-name="P9"><text:span text:style-name="T26">inst. 2</text:span></text:p>
              </table:table-cell>
              <table:table-cell>
                <text:p text:style-name="P9"><text:span text:style-name="T26">inst. 3</text:span></text:p>
              </table:table-cell>
              <table:table-cell>
                <text:p text:style-name="P9"><text:span text:style-name="T26">inst. 4</text:span></text:p>
              </table:table-cell>
              <table:table-cell>
                <text:p text:style-name="P9"><text:span text:style-name="T26">inst. 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28">inst. 1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28">inst. 2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100%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28">inst. 3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28">inst. 4</text:span></text:p>
              </table:table-cell>
              <table:table-cell>
                <text:p text:style-name="P6"><text:span text:style-name="T28">95.8%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PlaceHolder 1" draw:style-name="gr2" draw:layer="layout" svg:width="0cm" svg:height="0cm" svg:x="0cm" svg:y="0cm" draw:page-number="5" presentation:class="page"/>
          <draw:frame draw:name="PlaceHolder 2" presentation:style-name="pr6" draw:text-style-name="P3" draw:layer="layout" svg:width="0cm" svg:height="0cm" svg:x="0cm" svg:y="0cm" presentation:class="notes" presentation:placeholder="true" presentation:user-transformed="true">
            <draw:text-box/>
          </draw:frame>
          <draw:frame draw:name="PlaceHolder 3" presentation:style-name="pr2" draw:text-style-name="P5" draw:layer="layout" svg:width="0cm" svg:height="0cm" svg:x="0cm" svg:y="0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6" draw:style-name="dp1" draw:master-page-name="DEFAULT">
        <draw:custom-shape draw:name="Text 0" draw:style-name="gr62" draw:text-style-name="P7" draw:layer="layout" svg:width="22.858cm" svg:height="1.522cm" svg:x="1.27cm" svg:y="0.508cm">
          <text:p text:style-name="P6"><text:span text:style-name="T3">Walkthroug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" draw:style-name="gr4" draw:text-style-name="P8" draw:layer="layout" svg:x1="1.27cm" svg:y1="2.082cm" svg:x2="24.13cm" svg:y2="2.083cm">
          <text:p/>
        </draw:line>
        <draw:custom-shape draw:name="Text 2" draw:style-name="gr63" draw:text-style-name="P11" draw:layer="layout" svg:width="22.858cm" svg:height="0.76cm" svg:x="1.27cm" svg:y="2.286cm">
          <text:p text:style-name="P9"><text:span text:style-name="T20">For all image pairs: Compute instance matching c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18" draw:text-style-name="P12" draw:layer="layout" svg:width="22.858cm" svg:height="0.633cm" svg:x="1.27cm" svg:y="13.843cm">
          <text:p text:style-name="P1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14" draw:style-name="gr61" draw:layer="layout" svg:width="9.035cm" svg:height="3.866cm" svg:x="1.275cm" svg:y="3.479cm">
          <table:table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3" table:default-cell-style-name="ce1">
              <table:table-cell>
                <text:p text:style-name="P9"><text:span text:style-name="T26">Img1/</text:span><text:span text:style-name="T27"><text:line-break/></text:span><text:span text:style-name="T26">img0</text:span></text:p>
              </table:table-cell>
              <table:table-cell>
                <text:p text:style-name="P9"><text:span text:style-name="T26">inst. 1</text:span></text:p>
              </table:table-cell>
              <table:table-cell>
                <text:p text:style-name="P9"><text:span text:style-name="T26">inst. 2</text:span></text:p>
              </table:table-cell>
              <table:table-cell>
                <text:p text:style-name="P9"><text:span text:style-name="T26">inst. 3</text:span></text:p>
              </table:table-cell>
              <table:table-cell>
                <text:p text:style-name="P9"><text:span text:style-name="T26">inst. 4</text:span></text:p>
              </table:table-cell>
              <table:table-cell>
                <text:p text:style-name="P9"><text:span text:style-name="T26">inst. 5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26">inst. 1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26">inst. 2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100%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26">inst. 3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26">inst. 4</text:span></text:p>
              </table:table-cell>
              <table:table-cell>
                <text:p text:style-name="P6"><text:span text:style-name="T28">95.8%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elle 15" draw:style-name="gr61" draw:layer="layout" svg:width="6.535cm" svg:height="3.866cm" svg:x="10.564cm" svg:y="3.478cm">
          <table:table>
            <table:table-column table:style-name="co7"/>
            <table:table-column table:style-name="co7"/>
            <table:table-column table:style-name="co7"/>
            <table:table-column table:style-name="co7"/>
            <table:table-row table:style-name="ro5" table:default-cell-style-name="ce1">
              <table:table-cell>
                <text:p text:style-name="P9"><text:span text:style-name="T29">Img0/Img2</text:span></text:p>
              </table:table-cell>
              <table:table-cell>
                <text:p text:style-name="P9"><text:span text:style-name="T29">Inst1</text:span></text:p>
              </table:table-cell>
              <table:table-cell>
                <text:p text:style-name="P9"><text:span text:style-name="T29">Inst2</text:span></text:p>
              </table:table-cell>
              <table:table-cell>
                <text:p text:style-name="P9"><text:span text:style-name="T29">inst3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29">Inst1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29">Inst2</text:span></text:p>
              </table:table-cell>
              <table:table-cell>
                <text:p text:style-name="P9"><text:span text:style-name="T27">95,4%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29">Inst3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29">Inst4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95,2%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elle 28" draw:style-name="gr61" draw:layer="layout" svg:width="5.719cm" svg:height="4.985cm" svg:x="17.348cm" svg:y="3.476cm">
          <table:table>
            <table:table-column table:style-name="co8"/>
            <table:table-column table:style-name="co8"/>
            <table:table-column table:style-name="co8"/>
            <table:table-column table:style-name="co9"/>
            <table:table-row table:style-name="ro7" table:default-cell-style-name="ce1">
              <table:table-cell>
                <text:p text:style-name="P9"><text:span text:style-name="T29">Img1/Img2</text:span></text:p>
              </table:table-cell>
              <table:table-cell>
                <text:p text:style-name="P9"><text:span text:style-name="T29">Inst1</text:span></text:p>
              </table:table-cell>
              <table:table-cell>
                <text:p text:style-name="P9"><text:span text:style-name="T29">Inst2</text:span></text:p>
              </table:table-cell>
              <table:table-cell>
                <text:p text:style-name="P9"><text:span text:style-name="T29">inst3</text:span></text:p>
              </table:table-cell>
            </table:table-row>
            <table:table-row table:style-name="ro8" table:default-cell-style-name="ce1">
              <table:table-cell>
                <text:p text:style-name="P9"><text:span text:style-name="T29">Inst1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100%</text:span></text:p>
              </table:table-cell>
            </table:table-row>
            <table:table-row table:style-name="ro8" table:default-cell-style-name="ce1">
              <table:table-cell>
                <text:p text:style-name="P9"><text:span text:style-name="T29">Inst2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85,2%</text:span></text:p>
              </table:table-cell>
              <table:table-cell>
                <text:p text:style-name="P9"><text:span text:style-name="T27">-</text:span></text:p>
              </table:table-cell>
            </table:table-row>
            <table:table-row table:style-name="ro8" table:default-cell-style-name="ce1">
              <table:table-cell>
                <text:p text:style-name="P9"><text:span text:style-name="T29">Inst3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</table:table-row>
            <table:table-row table:style-name="ro8" table:default-cell-style-name="ce1">
              <table:table-cell>
                <text:p text:style-name="P9"><text:span text:style-name="T29">Inst4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</table:table-row>
            <table:table-row table:style-name="ro8" table:default-cell-style-name="ce1">
              <table:table-cell>
                <text:p text:style-name="P9"><text:span text:style-name="T29">Inst5</text:span></text:p>
              </table:table-cell>
              <table:table-cell>
                <text:p text:style-name="P9"><text:span text:style-name="T27">92,9%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PlaceHolder 1" draw:style-name="gr2" draw:layer="layout" svg:width="0cm" svg:height="0cm" svg:x="0cm" svg:y="0cm" draw:page-number="6" presentation:class="page"/>
          <draw:frame draw:name="PlaceHolder 2" presentation:style-name="pr7" draw:text-style-name="P3" draw:layer="layout" svg:width="0cm" svg:height="0cm" svg:x="0cm" svg:y="0cm" presentation:class="notes" presentation:placeholder="true" presentation:user-transformed="true">
            <draw:text-box/>
          </draw:frame>
          <draw:frame draw:name="PlaceHolder 3" presentation:style-name="pr2" draw:text-style-name="P5" draw:layer="layout" svg:width="0cm" svg:height="0cm" svg:x="0cm" svg:y="0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7" draw:style-name="dp1" draw:master-page-name="DEFAULT">
        <draw:custom-shape draw:name="Text 0" draw:style-name="gr64" draw:text-style-name="P7" draw:layer="layout" svg:width="22.858cm" svg:height="1.522cm" svg:x="1.27cm" svg:y="0.508cm">
          <text:p text:style-name="P6"><text:span text:style-name="T3">Walkthroug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" draw:style-name="gr4" draw:text-style-name="P8" draw:layer="layout" svg:x1="1.27cm" svg:y1="2.082cm" svg:x2="24.13cm" svg:y2="2.083cm">
          <text:p/>
        </draw:line>
        <draw:custom-shape draw:name="Text 2" draw:style-name="gr65" draw:text-style-name="P11" draw:layer="layout" svg:width="22.858cm" svg:height="0.76cm" svg:x="1.27cm" svg:y="2.286cm">
          <text:p text:style-name="P9"><text:span text:style-name="T20">For all instance pairs: Find optimal m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18" draw:text-style-name="P12" draw:layer="layout" svg:width="22.858cm" svg:height="0.633cm" svg:x="1.27cm" svg:y="13.843cm">
          <text:p text:style-name="P1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14" draw:style-name="gr61" draw:layer="layout" svg:width="9.035cm" svg:height="3.866cm" svg:x="1.275cm" svg:y="3.479cm">
          <table:table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3" table:default-cell-style-name="ce1">
              <table:table-cell>
                <text:p text:style-name="P9"><text:span text:style-name="T26">Img1/</text:span><text:span text:style-name="T27"><text:line-break/></text:span><text:span text:style-name="T26">img0</text:span></text:p>
              </table:table-cell>
              <table:table-cell>
                <text:p text:style-name="P9"><text:span text:style-name="T26">inst. 1</text:span></text:p>
              </table:table-cell>
              <table:table-cell>
                <text:p text:style-name="P9"><text:span text:style-name="T26">inst. 2</text:span></text:p>
              </table:table-cell>
              <table:table-cell>
                <text:p text:style-name="P9"><text:span text:style-name="T26">inst. 3</text:span></text:p>
              </table:table-cell>
              <table:table-cell>
                <text:p text:style-name="P9"><text:span text:style-name="T26">inst. 4</text:span></text:p>
              </table:table-cell>
              <table:table-cell>
                <text:p text:style-name="P9"><text:span text:style-name="T26">inst. 5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26">inst. 1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26">inst. 2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 table:style-name="ce2">
                <text:p text:style-name="P9"><text:span text:style-name="T28">100%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26">inst. 3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26">inst. 4</text:span></text:p>
              </table:table-cell>
              <table:table-cell table:style-name="ce2">
                <text:p text:style-name="P6"><text:span text:style-name="T28">95.8%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elle 15" draw:style-name="gr61" draw:layer="layout" svg:width="6.535cm" svg:height="3.866cm" svg:x="10.564cm" svg:y="3.478cm">
          <table:table>
            <table:table-column table:style-name="co7"/>
            <table:table-column table:style-name="co7"/>
            <table:table-column table:style-name="co7"/>
            <table:table-column table:style-name="co7"/>
            <table:table-row table:style-name="ro5" table:default-cell-style-name="ce1">
              <table:table-cell>
                <text:p text:style-name="P9"><text:span text:style-name="T29">Img0/Img2</text:span></text:p>
              </table:table-cell>
              <table:table-cell>
                <text:p text:style-name="P9"><text:span text:style-name="T29">Inst1</text:span></text:p>
              </table:table-cell>
              <table:table-cell>
                <text:p text:style-name="P9"><text:span text:style-name="T29">Inst2</text:span></text:p>
              </table:table-cell>
              <table:table-cell>
                <text:p text:style-name="P9"><text:span text:style-name="T29">inst3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29">Inst1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29">Inst2</text:span></text:p>
              </table:table-cell>
              <table:table-cell table:style-name="ce2">
                <text:p text:style-name="P9"><text:span text:style-name="T27">95,4%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29">Inst3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29">Inst4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  <table:table-cell table:style-name="ce2">
                <text:p text:style-name="P9"><text:span text:style-name="T27">95,2%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abelle 28" draw:style-name="gr61" draw:layer="layout" svg:width="5.719cm" svg:height="4.985cm" svg:x="17.348cm" svg:y="3.476cm">
          <table:table>
            <table:table-column table:style-name="co8"/>
            <table:table-column table:style-name="co8"/>
            <table:table-column table:style-name="co8"/>
            <table:table-column table:style-name="co9"/>
            <table:table-row table:style-name="ro7" table:default-cell-style-name="ce1">
              <table:table-cell>
                <text:p text:style-name="P9"><text:span text:style-name="T29">Img1/Img2</text:span></text:p>
              </table:table-cell>
              <table:table-cell>
                <text:p text:style-name="P9"><text:span text:style-name="T29">Inst1</text:span></text:p>
              </table:table-cell>
              <table:table-cell>
                <text:p text:style-name="P9"><text:span text:style-name="T29">Inst2</text:span></text:p>
              </table:table-cell>
              <table:table-cell>
                <text:p text:style-name="P9"><text:span text:style-name="T29">inst3</text:span></text:p>
              </table:table-cell>
            </table:table-row>
            <table:table-row table:style-name="ro8" table:default-cell-style-name="ce1">
              <table:table-cell>
                <text:p text:style-name="P9"><text:span text:style-name="T29">Inst1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  <table:table-cell table:style-name="ce2">
                <text:p text:style-name="P9"><text:span text:style-name="T27">100%</text:span></text:p>
              </table:table-cell>
            </table:table-row>
            <table:table-row table:style-name="ro8" table:default-cell-style-name="ce1">
              <table:table-cell>
                <text:p text:style-name="P9"><text:span text:style-name="T29">Inst2</text:span></text:p>
              </table:table-cell>
              <table:table-cell>
                <text:p text:style-name="P9"><text:span text:style-name="T27">-</text:span></text:p>
              </table:table-cell>
              <table:table-cell table:style-name="ce2">
                <text:p text:style-name="P9"><text:span text:style-name="T27">85,2%</text:span></text:p>
              </table:table-cell>
              <table:table-cell>
                <text:p text:style-name="P9"><text:span text:style-name="T27">-</text:span></text:p>
              </table:table-cell>
            </table:table-row>
            <table:table-row table:style-name="ro8" table:default-cell-style-name="ce1">
              <table:table-cell>
                <text:p text:style-name="P9"><text:span text:style-name="T29">Inst3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</table:table-row>
            <table:table-row table:style-name="ro8" table:default-cell-style-name="ce1">
              <table:table-cell>
                <text:p text:style-name="P9"><text:span text:style-name="T29">Inst4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</table:table-row>
            <table:table-row table:style-name="ro8" table:default-cell-style-name="ce1">
              <table:table-cell>
                <text:p text:style-name="P9"><text:span text:style-name="T29">Inst5</text:span></text:p>
              </table:table-cell>
              <table:table-cell table:style-name="ce2">
                <text:p text:style-name="P9"><text:span text:style-name="T27">92,9%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name="PlaceHolder 1" draw:style-name="gr2" draw:layer="layout" svg:width="0cm" svg:height="0cm" svg:x="0cm" svg:y="0cm" draw:page-number="7" presentation:class="page"/>
          <draw:frame draw:name="PlaceHolder 2" presentation:style-name="pr8" draw:text-style-name="P3" draw:layer="layout" svg:width="0cm" svg:height="0cm" svg:x="0cm" svg:y="0cm" presentation:class="notes" presentation:placeholder="true" presentation:user-transformed="true">
            <draw:text-box/>
          </draw:frame>
          <draw:frame draw:name="PlaceHolder 3" presentation:style-name="pr2" draw:text-style-name="P5" draw:layer="layout" svg:width="0cm" svg:height="0cm" svg:x="0cm" svg:y="0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8" draw:style-name="dp1" draw:master-page-name="DEFAULT">
        <draw:custom-shape draw:name="Text 0" draw:style-name="gr66" draw:text-style-name="P7" draw:layer="layout" svg:width="22.858cm" svg:height="1.522cm" svg:x="1.27cm" svg:y="0.508cm">
          <text:p text:style-name="P6"><text:span text:style-name="T3">Walkthroug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" draw:style-name="gr4" draw:text-style-name="P8" draw:layer="layout" svg:x1="1.27cm" svg:y1="2.082cm" svg:x2="24.13cm" svg:y2="2.083cm">
          <text:p/>
        </draw:line>
        <draw:custom-shape draw:name="Text 2" draw:style-name="gr67" draw:text-style-name="P11" draw:layer="layout" svg:width="22.858cm" svg:height="0.76cm" svg:x="1.27cm" svg:y="2.286cm">
          <text:p text:style-name="P9"><text:span text:style-name="T20">For all matching instances: Add edges to the grap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14" draw:style-name="gr61" draw:layer="layout" svg:width="9.035cm" svg:height="3.866cm" svg:x="1.275cm" svg:y="3.479cm">
          <table:table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3" table:default-cell-style-name="ce1">
              <table:table-cell>
                <text:p text:style-name="P9"><text:span text:style-name="T26">Img1/</text:span><text:span text:style-name="T27"><text:line-break/></text:span><text:span text:style-name="T26">img0</text:span></text:p>
              </table:table-cell>
              <table:table-cell>
                <text:p text:style-name="P9"><text:span text:style-name="T26">inst. 1</text:span></text:p>
              </table:table-cell>
              <table:table-cell>
                <text:p text:style-name="P9"><text:span text:style-name="T26">inst. 2</text:span></text:p>
              </table:table-cell>
              <table:table-cell>
                <text:p text:style-name="P9"><text:span text:style-name="T26">inst. 3</text:span></text:p>
              </table:table-cell>
              <table:table-cell>
                <text:p text:style-name="P9"><text:span text:style-name="T26">inst. 4</text:span></text:p>
              </table:table-cell>
              <table:table-cell>
                <text:p text:style-name="P9"><text:span text:style-name="T26">inst. 5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26">inst. 1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26">inst. 2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 table:style-name="ce2">
                <text:p text:style-name="P9"><text:span text:style-name="T28">100%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26">inst. 3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26">inst. 4</text:span></text:p>
              </table:table-cell>
              <table:table-cell table:style-name="ce2">
                <text:p text:style-name="P6"><text:span text:style-name="T28">95.8%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  <table:table-cell>
                <text:p text:style-name="P9"><text:span text:style-name="T28">-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Tabelle 15" draw:style-name="gr61" draw:layer="layout" svg:width="6.535cm" svg:height="3.866cm" svg:x="10.564cm" svg:y="3.478cm">
          <table:table>
            <table:table-column table:style-name="co7"/>
            <table:table-column table:style-name="co7"/>
            <table:table-column table:style-name="co7"/>
            <table:table-column table:style-name="co7"/>
            <table:table-row table:style-name="ro5" table:default-cell-style-name="ce1">
              <table:table-cell>
                <text:p text:style-name="P9"><text:span text:style-name="T29">Img0/Img2</text:span></text:p>
              </table:table-cell>
              <table:table-cell>
                <text:p text:style-name="P9"><text:span text:style-name="T29">Inst1</text:span></text:p>
              </table:table-cell>
              <table:table-cell>
                <text:p text:style-name="P9"><text:span text:style-name="T29">Inst2</text:span></text:p>
              </table:table-cell>
              <table:table-cell>
                <text:p text:style-name="P9"><text:span text:style-name="T29">inst3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29">Ints1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29">Itns2</text:span></text:p>
              </table:table-cell>
              <table:table-cell table:style-name="ce2">
                <text:p text:style-name="P9"><text:span text:style-name="T27">95,4%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29">Inst3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29">inst4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  <table:table-cell table:style-name="ce2">
                <text:p text:style-name="P9"><text:span text:style-name="T27">95,2%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Tabelle 28" draw:style-name="gr61" draw:layer="layout" svg:width="5.719cm" svg:height="4.985cm" svg:x="17.348cm" svg:y="3.476cm">
          <table:table>
            <table:table-column table:style-name="co8"/>
            <table:table-column table:style-name="co8"/>
            <table:table-column table:style-name="co8"/>
            <table:table-column table:style-name="co9"/>
            <table:table-row table:style-name="ro7" table:default-cell-style-name="ce1">
              <table:table-cell>
                <text:p text:style-name="P9"><text:span text:style-name="T29">Img1/Img2</text:span></text:p>
              </table:table-cell>
              <table:table-cell>
                <text:p text:style-name="P9"><text:span text:style-name="T29">Inst1</text:span></text:p>
              </table:table-cell>
              <table:table-cell>
                <text:p text:style-name="P9"><text:span text:style-name="T29">Inst2</text:span></text:p>
              </table:table-cell>
              <table:table-cell>
                <text:p text:style-name="P9"><text:span text:style-name="T29">inst3</text:span></text:p>
              </table:table-cell>
            </table:table-row>
            <table:table-row table:style-name="ro8" table:default-cell-style-name="ce1">
              <table:table-cell>
                <text:p text:style-name="P9"><text:span text:style-name="T29">Inst1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  <table:table-cell table:style-name="ce2">
                <text:p text:style-name="P9"><text:span text:style-name="T27">100%</text:span></text:p>
              </table:table-cell>
            </table:table-row>
            <table:table-row table:style-name="ro8" table:default-cell-style-name="ce1">
              <table:table-cell>
                <text:p text:style-name="P9"><text:span text:style-name="T29">Inst2</text:span></text:p>
              </table:table-cell>
              <table:table-cell>
                <text:p text:style-name="P9"><text:span text:style-name="T27">-</text:span></text:p>
              </table:table-cell>
              <table:table-cell table:style-name="ce2">
                <text:p text:style-name="P9"><text:span text:style-name="T27">85,2%</text:span></text:p>
              </table:table-cell>
              <table:table-cell>
                <text:p text:style-name="P9"><text:span text:style-name="T27">-</text:span></text:p>
              </table:table-cell>
            </table:table-row>
            <table:table-row table:style-name="ro8" table:default-cell-style-name="ce1">
              <table:table-cell>
                <text:p text:style-name="P9"><text:span text:style-name="T29">Inst3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</table:table-row>
            <table:table-row table:style-name="ro8" table:default-cell-style-name="ce1">
              <table:table-cell>
                <text:p text:style-name="P9"><text:span text:style-name="T29">Inst4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</table:table-row>
            <table:table-row table:style-name="ro8" table:default-cell-style-name="ce1">
              <table:table-cell>
                <text:p text:style-name="P9"><text:span text:style-name="T29">Inst5</text:span></text:p>
              </table:table-cell>
              <table:table-cell table:style-name="ce2">
                <text:p text:style-name="P9"><text:span text:style-name="T27">92,9%</text:span></text:p>
              </table:table-cell>
              <table:table-cell>
                <text:p text:style-name="P9"><text:span text:style-name="T27">-</text:span></text:p>
              </table:table-cell>
              <table:table-cell>
                <text:p text:style-name="P9"><text:span text:style-name="T27">-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Grafik 7" draw:style-name="gr19" draw:text-style-name="P13" draw:layer="layout" svg:width="11.877cm" svg:height="5.061cm" svg:x="4.379cm" svg:y="7.606cm">
          <draw:image xlink:href="Pictures/1000000100000735000002EA55ED5C33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2" draw:layer="layout" svg:width="0cm" svg:height="0cm" svg:x="0cm" svg:y="0cm" draw:page-number="8" presentation:class="page"/>
          <draw:frame draw:name="PlaceHolder 2" presentation:style-name="pr9" draw:text-style-name="P3" draw:layer="layout" svg:width="0cm" svg:height="0cm" svg:x="0cm" svg:y="0cm" presentation:class="notes" presentation:placeholder="true" presentation:user-transformed="true">
            <draw:text-box/>
          </draw:frame>
          <draw:frame draw:name="PlaceHolder 3" presentation:style-name="pr2" draw:text-style-name="P5" draw:layer="layout" svg:width="0cm" svg:height="0cm" svg:x="0cm" svg:y="0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9" draw:style-name="dp1" draw:master-page-name="DEFAULT">
        <draw:custom-shape draw:name="Text 0" draw:style-name="gr68" draw:text-style-name="P7" draw:layer="layout" svg:width="22.858cm" svg:height="1.522cm" svg:x="1.27cm" svg:y="0.508cm">
          <text:p text:style-name="P6"><text:span text:style-name="T3">Walkthroug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" draw:style-name="gr4" draw:text-style-name="P8" draw:layer="layout" svg:x1="1.27cm" svg:y1="2.082cm" svg:x2="24.13cm" svg:y2="2.083cm">
          <text:p/>
        </draw:line>
        <draw:custom-shape draw:name="Text 2" draw:style-name="gr69" draw:text-style-name="P11" draw:layer="layout" svg:width="22.858cm" svg:height="0.76cm" svg:x="1.27cm" svg:y="2.286cm">
          <text:p text:style-name="P9"><text:span text:style-name="T20">Count components: 3 connected components, 4 singletons →</text:span><text:span text:style-name="T30"> 7 </text:span><text:span text:style-name="T20">counted sho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18" draw:text-style-name="P12" draw:layer="layout" svg:width="22.858cm" svg:height="0.633cm" svg:x="1.27cm" svg:y="13.843cm">
          <text:p text:style-name="P1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7" draw:style-name="gr19" draw:text-style-name="P13" draw:layer="layout" svg:width="22.858cm" svg:height="9.241cm" svg:x="1.073cm" svg:y="3.251cm">
          <draw:image xlink:href="Pictures/1000000100000735000002EA55ED5C33.png" xlink:type="simple" xlink:show="embed" xlink:actuate="onLoad" draw:mime-type="image/png">
            <text:p/>
          </draw:image>
        </draw:frame>
        <draw:custom-shape draw:name="Ellipse 4" draw:style-name="gr70" draw:text-style-name="P18" draw:layer="layout" svg:width="1.86cm" svg:height="1.863cm" svg:x="1.073cm" svg:y="3.635cm">
          <text:p text:style-name="P17"><text:span text:style-name="T3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71" draw:text-style-name="P18" draw:layer="layout" svg:width="1.86cm" svg:height="1.863cm" svg:x="1.048cm" svg:y="7.111cm">
          <text:p text:style-name="P17"><text:span text:style-name="T3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71" draw:text-style-name="P18" draw:layer="layout" svg:width="2.094cm" svg:height="2.052cm" svg:x="10.801cm" svg:y="7.016cm">
          <text:p text:style-name="P17"><text:span text:style-name="T3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72" draw:text-style-name="P18" draw:layer="layout" svg:width="1.835cm" svg:height="1.624cm" svg:x="1.073cm" svg:y="5.485cm">
          <text:p text:style-name="P17"><text:span text:style-name="T3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72" draw:text-style-name="P18" draw:layer="layout" svg:width="1.835cm" svg:height="1.624cm" svg:x="20.534cm" svg:y="3.754cm">
          <text:p text:style-name="P17"><text:span text:style-name="T3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72" draw:text-style-name="P18" draw:layer="layout" svg:width="1.835cm" svg:height="1.624cm" svg:x="10.863cm" svg:y="10.73cm">
          <text:p text:style-name="P17"><text:span text:style-name="T3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73" draw:text-style-name="P18" draw:layer="layout" svg:width="1.835cm" svg:height="1.863cm" svg:x="10.776cm" svg:y="3.692cm">
          <text:p text:style-name="P17"><text:span text:style-name="T3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" draw:style-name="gr73" draw:text-style-name="P18" draw:layer="layout" svg:width="1.835cm" svg:height="1.863cm" svg:x="20.534cm" svg:y="7.205cm">
          <text:p text:style-name="P17"><text:span text:style-name="T3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4" draw:style-name="gr73" draw:text-style-name="P18" draw:layer="layout" svg:width="1.835cm" svg:height="1.863cm" svg:x="1.073cm" svg:y="8.87cm">
          <text:p text:style-name="P17"><text:span text:style-name="T3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" draw:style-name="gr70" draw:text-style-name="P18" draw:layer="layout" svg:width="1.86cm" svg:height="1.863cm" svg:x="10.887cm" svg:y="8.866cm">
          <text:p text:style-name="P17"><text:span text:style-name="T3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6" draw:style-name="gr74" draw:text-style-name="P18" draw:layer="layout" svg:width="1.86cm" svg:height="1.863cm" svg:x="10.838cm" svg:y="5.395cm">
          <text:p text:style-name="P17"><text:span text:style-name="T3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8" draw:style-name="gr74" draw:text-style-name="P18" draw:layer="layout" svg:width="1.86cm" svg:height="1.863cm" svg:x="20.616cm" svg:y="5.374cm">
          <text:p text:style-name="P17"><text:span text:style-name="T3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PlaceHolder 1" draw:style-name="gr2" draw:layer="layout" svg:width="0cm" svg:height="0cm" svg:x="0cm" svg:y="0cm" draw:page-number="9" presentation:class="page"/>
          <draw:frame draw:name="PlaceHolder 2" presentation:style-name="pr10" draw:text-style-name="P3" draw:layer="layout" svg:width="0cm" svg:height="0cm" svg:x="0cm" svg:y="0cm" presentation:class="notes" presentation:placeholder="true" presentation:user-transformed="true">
            <draw:text-box/>
          </draw:frame>
          <draw:frame draw:name="PlaceHolder 3" presentation:style-name="pr2" draw:text-style-name="P5" draw:layer="layout" svg:width="0cm" svg:height="0cm" svg:x="0cm" svg:y="0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(Textkörper)" svg:font-family="'Calibri (Textkörper)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Wingdings" svg:font-family="Wingding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aph-based Multi-view Object Counting via VGGT + SAM3</dc:title>
    <dc:subject>PptxGenJS Presentation</dc:subject>
    <meta:initial-creator>PptxGenJS</meta:initial-creator>
    <meta:editing-cycles>195</meta:editing-cycles>
    <meta:creation-date>2026-06-05T09:30:05</meta:creation-date>
    <dc:date>2026-06-05T13:58:42.321832517</dc:date>
    <dc:language>en-US</dc:language>
    <meta:editing-duration>PT20M41S</meta:editing-duration>
    <meta:generator>LibreOffice/24.2.7.2$Linux_X86_64 LibreOffice_project/420$Build-2</meta:generator>
    <meta:document-statistic meta:object-count="181"/>
    <meta:user-defined meta:name="AppVersion">16.0000</meta:user-defined>
    <meta:user-defined meta:name="Company">PptxGenJS</meta:user-defined>
    <meta:user-defined meta:name="Notes" meta:value-type="float">9</meta:user-defined>
    <meta:user-defined meta:name="PresentationFormat">Bildschirmpräsentation (16:9)</meta:user-defined>
    <meta:user-defined meta:name="Slides" meta:value-type="float">9</meta:user-defined>
  </office:meta>
</office:document-meta>
</file>